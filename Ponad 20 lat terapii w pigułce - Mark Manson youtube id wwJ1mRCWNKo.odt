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 PL SungtiL GB" svg:font-family="'AR PL SungtiL GB'" style:font-family-generic="system"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Arial"/>
    </style:style>
    <style:style style:name="P2" style:family="paragraph" style:parent-style-name="Text_20_body">
      <style:text-properties style:font-name="Arial"/>
    </style:style>
    <style:style style:name="P3" style:family="paragraph" style:parent-style-name="Heading_20_3">
      <style:text-properties style:font-name="Arial"/>
    </style:style>
    <style:style style:name="P4" style:family="paragraph" style:parent-style-name="Text_20_body" style:list-style-name="L1">
      <style:text-properties style:font-name="Arial"/>
    </style:style>
    <style:style style:name="T1" style:family="text">
      <style:text-properties fo:font-weight="bold"/>
    </style:style>
    <style:style style:name="T2" style:family="text">
      <style:text-properties fo:font-style="italic"/>
    </style:style>
    <style:style style:name="T3" style:family="text">
      <style:text-properties style:font-name="Arial"/>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onad 20 lat terapii w pigułce</text:h>
      <text:p text:style-name="P2">Nazywam się Mark Manson. Jestem autorem bestsellerów numer jeden „New York Timesa” i przez ostatnie 15 lat uczyłem miliony ludzi praktycznej psychologii, która pomaga im odmienić swoje życie.</text:p>
      <text:h text:style-name="P3" text:outline-level="3" text:is-list-header="true">Lekcja 1: Nikt nie idzie ci na ratunek</text:h>
      <text:p text:style-name="P2">Kiedy idziesz na terapię – niezależnie od tego, z czym się mierzysz – pierwszą i najważniejszą lekcją, jaką musisz sobie wbić do głowy, jest to, że <text:span text:style-name="T1">nikt nie idzie ci na ratunek</text:span>. Co więcej, sama fantazja o byciu uratowanym jest rzeczą, która najbardziej cię blokuje. To sposób na zrzucenie z siebie odpowiedzialności, przy jednoczesnym poczuciu szlachetności i usprawiedliwienia dla własnego cierpienia.</text:p>
      <text:p text:style-name="P2">Najbardziej niebezpieczna wersja przekonania „ktoś mnie uratuje” pojawia się wtedy, gdy maskujesz ją jako plan. Mówisz sobie: <text:span text:style-name="T2">„Gdy tylko dostanę awans...”, „Gdy tylko znajdę odpowiedniego partnera...”, „Gdy tylko przeprowadzę się do innego miasta... w końcu wszystko będzie dobrze i ułoży się po mojej myśli”</text:span>.</text:p>
      <text:p text:style-name="P2">Tymczasem każdy rok spędzony na czekaniu na idealnego mentora, partnera czy okazję to rok, w którym dobrowolnie decydujesz się pozostać dokładnie w tym samym miejscu. Samodzielność to nie jest jakiś twardy, oklepany indywidualizm. To moment, w którym zdajesz sobie sprawę, że nawet ludzie, którzy cię kochają, nigdy nie będą pragnąć twojego szczęścia bardziej niż ty sam. A teraz pomyśl, jak bardzo mają to gdzieś ludzie, którzy cię nie kochają. Dokładnie – kompletnie ich to nie obchodzi.</text:p>
      <text:h text:style-name="P3" text:outline-level="3" text:is-list-header="true">Lekcja 2: Nie wszystkie problemy trzeba naprawiać</text:h>
      <text:p text:style-name="P2">Drugą lekcją z terapii jest to, że nie wszystkie twoje problemy da się – lub powinno się – naprawić. Czasami po prostu uczysz się żyć pomimo nich. Sprzedano nam bajkę, że uzdrowienie oznacza osiągnięcie nieskazitelnego stanu emocjonalnego, w którym nic już nie boli. Ale to nie jest uzdrowienie – to zwykłe wyparcie.</text:p>
      <text:p text:style-name="P2">Prawda jest taka, że problemy w życiu nigdy nie znikają. One po prostu wchodzą na wyższy poziom – stają się nieco lepszymi problemami. I na tym właśnie polega rozwój. Postęp to przechodzenie od jednego problemu do drugiego, odrobinę mniej beznadziejnego. Ludzie, którzy sprawiają wrażenie, że panują nad swoim życiem, nie rozwiązali więcej problemów niż ty. Oni po prostu przestali oczekiwać, że każdy problem da się rozwiązać.</text:p>
      <text:p text:style-name="P2">Jest to szczególnie widoczne w branży samorozwoju. Kiedy ludzie dowiadują się, jak leczyć rany i rozwiązywać niektóre ze swoich problemów, wręcz się od tego uzależniają. Zaczynają szukać kolejnych dziur w całym. Prawie nie mogą się doczekać kolejnego kryzysu, z którym będą mogli pójść do swojego trenera lub terapeuty. Ta obsesyjna potrzeba ulepszania wszystkiego może cię blokować tak samo, jak całkowity brak chęci do zmiany.</text:p>
      <text:p text:style-name="P2">Kiedy przestajesz walczyć z danym problemem i po prostu pozwalasz mu być, dzieje się coś dziwnego. Odkrywasz, że większość twojego cierpienia wynikała z oporu przed bólem, a nie z samego bólu.</text:p>
      <text:h text:style-name="P3" text:outline-level="3" text:is-list-header="true">Lekcja 3: Strach przed wyimaginowaną publicznością</text:h>
      <text:p text:style-name="P2">Kolejna ważna lekcja: <text:span text:style-name="T1">nie boisz się porażki, boisz się tego, że inni zobaczą, jak ponosisz </text:span><text:soft-page-break/><text:span text:style-name="T1">porażkę</text:span>. A to dwie zupełnie różne rzeczy. Gdybyś mógł przegrywać w całkowitej anonimowości, bez świadków i konsekwencji, próbowałbyś wszystkiego bez końca. Miałbyś to gdzieś i po prostu działał.</text:p>
      <text:p text:style-name="P2">To pokazuje, że strach nie dotyczy samego sukcesu, porażki czy tego, jak dobry lub słaby w czymś jesteś. Chodzi o wyimaginowaną publiczność, której twoim zdaniem to obejdzie. Ludzie są pod tym względem niesamowicie dziwni – przeżywamy swoje upokorzenie z wyprzedzeniem. Zakładamy najgorszy możliwy scenariusz, zanim on w ogóle nastąpi. A kiedy już sami się zawstydzimy, odtwarzamy to w kółko w swoich głowach – nie przez miesiące, ale przez całe dekady.</text:p>
      <text:p text:style-name="P2">Ludzie, których tak bardzo się obawiasz, wcale nie są tacy wspaniali. Oni ledwo zwracają na ciebie uwagę, bo są zbyt zajęci kontrolowaniem własnego strachu przed oceną innych, by w ogóle przejmować się tobą.</text:p>
      <text:h text:style-name="P3" text:outline-level="3" text:is-list-header="true">Lekcja 4: Twój umysł bez przerwy cię okłamuje</text:h>
      <text:p text:style-name="P2">Musisz nauczyć się kwestionować własne myśli. Z ewolucyjnego punktu widzenia zadaniem twojego mózgu nie jest pokazywanie rzeczywistości takiej, jaka jest – jego zadaniem jest utrzymanie cię przy życiu. A to dwa zupełnie różne cele.</text:p>
      <text:list text:style-name="L1">
        <text:list-item>
          <text:p text:style-name="P4"><text:span text:style-name="T1">Depresja cię okłamuje:</text:span> mówi ci, że nic nie ma znaczenia, choć w rzeczywistości ma.</text:p>
        </text:list-item>
        <text:list-item>
          <text:p text:style-name="P4"><text:span text:style-name="T1">Lęk cię okłamuje:</text:span> wmawia ci, że wszystko pójdzie nie tak, choć tak się nie stanie.</text:p>
        </text:list-item>
        <text:list-item>
          <text:p text:style-name="P4"><text:span text:style-name="T1">Niepewność cię okłamuje:</text:span> twierdzi, że nie jesteś wystarczająco dobry taki, jaki jesteś, mimo że w gruncie rzeczy jesteś.</text:p>
        </text:list-item>
      </text:list>
      <text:p text:style-name="P2">Te myśli wydają się tak prawdziwe, ponieważ słyszysz je we własnej głowie, wypowiadane własnym głosem. Przez nasz umysł przelatują tysiące myśli dziennie, a nasz instynkt podpowiada nam, by traktować każdą z nich jak pilny komunikat z ostatniej chwili w CNN. Tymczasem większość z nich to zwykły spam i reklamy. Sztuka nie polega więc na tym, by uczyć się pozytywnego myślenia. Chodzi o to, by przyłapać się w połowie tworzenia tej wewnętrznej historii i zapytać samego siebie: <text:span text:style-name="T2">„Czy to w ogóle prawda? Czy po prostu działam na autopilocie?”</text:span>.</text:p>
      <text:h text:style-name="P3" text:outline-level="3" text:is-list-header="true">Lekcja 5: Nie każdy musi cię lubić</text:h>
      <text:p text:style-name="P2">Bez względu na to, co zrobisz, nie zyskasz sympatii wszystkich – i to jest świetna wiadomość. Długo zajęło mi zrozumienie tego, ale ludzie, którzy cię nie lubią, robią ci przysługę. Sami eliminują się z twojego życia, dzięki czemu przestajesz marnować energię na relacje, które i tak by nie przetrwały.</text:p>
      <text:p text:style-name="P2">Potrzebujesz ludzi, którzy się z tobą nie zgadzają, i takich, dla których twój charakter będzie zbyt szorstki. To tarcie jest dowodem na to, że masz własną tożsamość, że coś reprezentujesz i że twoje życie ma znaczenie. Bycie lubianym przez wszystkich to niewidzialne więzienie. Oddajesz wtedy kontrolę nad własną wartością otaczającemu światu i desperacko próbujesz sprostać oczekiwaniom innych zamiast własnym. W momencie, gdy zaakceptujesz, że niektórzy ludzie i tak odejdą, dostajesz wolność, by być sobą. A ci, którzy zostaną, będą twoimi prawdziwymi ludźmi.</text:p>
      <text:h text:style-name="P3" text:outline-level="3" text:is-list-header="true">Lekcja 6: Uczucia to dane, a nie dyrektywy</text:h>
      <text:p text:style-name="P2">Uczucia to nie fakty, ale nadal warto ich słuchać. Mamy naturalną tendencję do traktowania <text:soft-page-break/>emocji jak jakiegoś kosmicznego dekretu wyrytego w kamieniu. To nie tylko błąd – rzeczywistość jest zupełnie odwrotna. Twoje uczucia są zawsze przejściowe, często losowe, całkowicie samolubne i bywają błędne.</text:p>
      <text:p text:style-name="P2">Zasadniczo uczucia to po prostu dane, a nie rozkazy. Sygnalizują ci, że dzieje się coś, na co warto zwrócić uwagę lub co warto zmienić, ale nie musisz ślepo za nimi iść. Twoim zadaniem jest je przeanalizować, a decyzja, co z nimi zrobisz, należy wyłącznie do ciebie. Osobiście traktuję swoje emocje jak sekcję komentarzy na YouTube – dobrze jest tam zajrzeć i zobaczyć, co się dzieje, ale nie biorę tego śmiertelnie poważnie.</text:p>
      <text:h text:style-name="P3" text:outline-level="3" text:is-list-header="true">Lekcja 7: Pozwól umrzeć starym marzeniom</text:h>
      <text:p text:style-name="P2">Czasami najlepszą rzeczą, jaką możesz zrobić, jest pozwolenie umrzeć swojemu marzeniu. Kurczowe trzymanie się niewłaściwego celu jest jak tkwienie w wypalonym małżeństwie. Samo w sobie może nie czyni cię nieszczęśliwym, ale skutecznie uniemożliwi ci znalezienie prawdziwego szczęścia.</text:p>
      <text:p text:style-name="P2">Większość rzeczy, których oczekujemy od siebie mając 20 lat, okazuje się całkowicie niepraktyczna, nierealna lub najzwyczajniej błędna, gdy kończymy czterdziestkę. Kiedy myślę o tym, co chciałem robić w wieku 20 lat – dzięki Bogu, że odpuściłem. Nie byłoby mnie tutaj, gdybym realizował tamte plany. I to jest w porządku, tak właśnie toczy się życie.</text:p>
      <text:p text:style-name="P2">Nie wiem, dlaczego tak bardzo romantyzujemy pomysł, że jak masz marzenie, to musisz zajechać się na śmierć, żeby je osiągnąć. To może działać w przypadku garstki wybitnie utalentowanych jednostek, ale większość z nas będzie musiała zmieniać kierunek trzy lub cztery razy w życiu, zanim naprawdę odnajdzie swoje miejsce. Z perspektywy czasu będziesz wdzięczny, że nie stałeś się osobą, którą chciałeś być w wieku 20 lat.</text:p>
      <text:p text:style-name="P2">Ludzie unikają odpuszczania, bo czują, że zainwestowali w dane marzenie zbyt wiele czasu i energii. Ale ten błąd utopionych kosztów zniszczy ci życie, jeśli mu na to pozwolisz. Smutek to cena za porzucenie marzenia – a większość ludzi woli pozostać nieszczęśliwymi i utknąć w miejscu, niż ten smutek poczuć.</text:p>
      <text:h text:style-name="P3" text:outline-level="3" text:is-list-header="true">Lekcja 8: Ograniczenia są dobre</text:h>
      <text:p text:style-name="P2">W końcu dowiesz się, że twoje ograniczenia są dla ciebie dobre. Plagą naszych czasów jest przekonanie, że nieskończony wybór daje wolność – w rzeczywistości tworzy on nieskończony paraliż. Osoba z 10 000 opcji i osoba z zerowym wyborem kończą w tym samym miejscu: nie robiąc absolutnie nic.</text:p>
      <text:p text:style-name="P2">Prawda jest taka, że ograniczenia wymuszają kreatywność. Każdy wielki artysta, przedsiębiorca i myśliciel tworzy swoje najlepsze dzieła wewnątrz określonych ram, a nie poza nimi. Mówienie „nie” 95% rzeczy w życiu nadaje sens pozostałym 5%. Życie bez ograniczeń jest ostatecznie życiem bez głębi – stajesz się oceanem szerokim na tysiąc mil, ale głębokim zaledwie na centymetr.</text:p>
      <text:p text:style-name="P2">Twoja śmiertelność, energia, czas, brak talentu czy wychowanie – to wszystko są ograniczenia. Ale to nie są wady. To są powody, dla których cokolwiek robisz, ma w ogóle znaczenie. Zadaj sobie pytanie: co zamierzasz z nimi zrobić?</text:p>
      <text:h text:style-name="P3" text:outline-level="3" text:is-list-header="true">Lekcja 9: Twoi rodzice zrobili, co mogli (i wciąż coś schrzanili)</text:h>
      <text:p text:style-name="P2">Obie te rzeczy mogą być prawdziwe jednocześnie. W tym miejscu większość ludzi się <text:soft-page-break/>zatrzymuje. Myślą, że muszą wybierać między współczuciem dla rodziców a szczerością wobec tego, jak bardzo schrzanione było ich dzieciństwo. Nie musisz wybierać. To, że dali z siebie wszystko, nie oznacza automatycznie, że to „wszystko” było wystarczająco dobre. To po prostu znaczy, że się starali – a bądźmy szczerzy, intencje i starania też mają znaczenie.</text:p>
      <text:p text:style-name="P2">Jeśli dali z siebie 100%, a to pokryło zaledwie 50% twoich potrzeb, to nie jest twoja wina. To przykre, to boli i prawdopodobnie przez długi czas nosiłeś ze sobą ten plecak pełen traum, ale niekoniecznie jest to czyjaś wina. Wybaczenie rodzicom nie polega na zdejmowaniu odpowiedzialności z nich – polega na uwolnieniu samego siebie. Chodzi o zatamowanie krwawienia, abyś mógł iść dalej. To egoizm w najlepszym tego słowa znaczeniu.</text:p>
      <text:p text:style-name="P2">Poza tym twoi rodzice też byli wychowywani przez skrajnie poturbowanych ludzi, którzy również robili co w ich mocy, co i tak było niewystarczające. Pamiętam, jak tuż po studiach wściekłem się na ojca o jakąś bzdurę i robiłem mu wyrzuty, że nie poświęcał mi uwagi. Tydzień później opowiedział mi historię o tym, jak jego własni rodzice nawet nie przyszli na jego rozdanie dyplomów. Zadzwonili tylko i powiedzieli: <text:span text:style-name="T2">„Dobra robota, synu”</text:span> i się rozłączyli. Pomyślałem wtedy: <text:span text:style-name="T2">„Okej, czyli w moim przypadku i tak nastąpił postęp. Dzięki, tato”</text:span>.</text:p>
      <text:h text:style-name="P3" text:outline-level="3" text:is-list-header="true">Lekcja 10: Tylko garstka ludzi ma znaczenie</text:h>
      <text:p text:style-name="P2">W dłuższej perspektywie liczy się tylko kilka osób. W ciągu życia poznasz tysiące ludzi. Setki z nich wydadzą ci się interesujące, zabawne i miłe, a ty będziesz przejmować się opiniami tych kilkuset osób.</text:p>
      <text:p text:style-name="P2">Prawda jest jednak taka, że zaledwie garstka – może maksymalnie kilkanaście osób – realnie i znacząco zmieni trajektorię twojego życia. Kiedy już znajdziesz tych ludzi, musisz postawić ich na pierwszym miejscu. Cała reszta, o której myślisz, że przejmuje się każdym twoim krokiem, to tylko szum w tle.</text:p>
      <text:p text:style-name="P2">Mamy tendencję do inwestowania w ilość relacji, ponieważ prawdziwa bliskość jest trudna i przerażająca. Głębokie dopuszczenie do siebie pięciu osób oznacza, że te pięć osób może cię naprawdę skrzywdzić. Dlatego łatwiej jest rozpraszać się sztucznymi znajomościami, networkingiem, imprezami i pokazywaniem swojego życia na Instagramie, zachowując przy tym wszystkie opcje otwarte.</text:p>
      <text:p text:style-name="P2">Ale na łożu śmierci nie będziesz myśleć o liczbie obserwujących. Nie będziesz myśleć o kontaktach biznesowych ani o ludziach, którzy polubili twój post. Prawdopodobnie pomyślisz o pięciu lub sześciu twarzach.</text:p>
      <text:p text:style-name="P2">Zacznij więc dbać o nie już teraz.</text:p>
      <text:p text:style-name="Text_20_body"><text:a xlink:type="simple" xlink:href="https://www.youtube.com/watch?v=wwJ1mRCWNKo" text:style-name="Internet_20_link" text:visited-style-name="Visited_20_Internet_20_Link"><text:span text:style-name="T3">https://www.youtube.com/watch?v=wwJ1mRCWNKo</text:span></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 PL SungtiL GB" svg:font-family="'AR PL SungtiL GB'" style:font-family-generic="system"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pl" fo:country="PL" style:letter-kerning="true" style:font-name-asian="AR PL SungtiL GB"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mm" style:writing-mode="page"/>
      <style:text-properties style:use-window-font-color="true" loext:opacity="0%" style:font-name="Liberation Serif" fo:font-size="12pt" fo:language="pl" fo:country="PL" style:font-name-asian="AR PL SungtiL GB"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3.53mm" fo:margin-bottom="2.12m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chapter">
      <style:paragraph-properties fo:margin-top="2.47mm" fo:margin-bottom="2.12m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0" number:min-decimal-places="0" number:min-integer-digits="1" number:grouping="true"/>
      <number:text>.--</number:text>
    </number:currency-style>
    <number:currency-style style:name="N121">
      <style:text-properties fo:color="#ff0000"/>
      <number:text>-</number:text>
      <number:currency-symbol number:language="en" number:country="US">$</number:currency-symbol>
      <number:number number:decimal-places="0" number:min-decimal-places="0" number:min-integer-digits="1" number:grouping="true"/>
      <number:text>.--</number:text>
      <style:map style:condition="value()&gt;=0" style:apply-style-name="N121P0"/>
    </number:currency-style>
    <number:number-style style:name="N123P0" style:volatile="true">
      <number:number number:decimal-places="0" number:min-decimal-places="0" number:min-integer-digits="1" number:grouping="true"/>
      <number:text loext:blank-width-char=")">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loext:blank-width-char=")">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pl" number:country="PL" loext:transliteration-spellout="title cardinal" number:transliteration-language="pl" number:transliteration-country="PL">
      <number:number number:decimal-places="0" number:min-decimal-places="0" number:min-integer-digits="1"/>
    </number:number-style>
    <number:number-style style:name="N10115" number:language="pl" number:country="PL" loext:transliteration-spellout="title USD" number:transliteration-language="pl" number:transliteration-country="PL">
      <number:number number:decimal-places="0" number:min-decimal-places="0" number:min-integer-digits="1"/>
    </number:number-style>
    <number:number-style style:name="N10116" number:language="pl" number:country="PL" loext:transliteration-spellout="title USD" number:transliteration-language="pl" number:transliteration-country="PL">
      <number:number number:decimal-places="2" number:min-decimal-places="2" number:min-integer-digits="1"/>
    </number:number-style>
    <number:number-style style:name="N10117" number:language="pl" number:country="PL" loext:transliteration-spellout="upper USD" number:transliteration-language="pl" number:transliteration-country="PL">
      <number:number number:decimal-places="0" number:min-decimal-places="0" number:min-integer-digits="1"/>
    </number:number-style>
    <number:number-style style:name="N10118" number:language="pl" number:country="PL" loext:transliteration-spellout="upper USD" number:transliteration-language="pl" number:transliteration-country="PL">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14.46mm" fo:margin-bottom="14.46mm" fo:margin-left="14.46mm" fo:margin-right="14.46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4.2$MacOSX_AARCH64 LibreOffice_project/0229ac93fcf0d7cbc6376066c6f35021cef002dc</meta:generator>
    <dc:date>2026-06-16T18:19:33.878838000</dc:date>
    <meta:editing-duration>PT17M6S</meta:editing-duration>
    <meta:editing-cycles>4</meta:editing-cycles>
    <meta:print-date>2026-06-16T13:02:39.112331000</meta:print-date>
    <meta:printed-by>PDF files</meta:printed-by>
    <meta:document-statistic meta:table-count="0" meta:image-count="0" meta:object-count="0" meta:page-count="4" meta:paragraph-count="47" meta:word-count="1774" meta:character-count="11648" meta:non-whitespace-character-count="9902"/>
  </office:meta>
</office:document-meta>
</file>